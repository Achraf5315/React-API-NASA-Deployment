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ijlkeuzes (UI / CSS verantwoording)</text:h>
      <text:p text:style-name="Text_20_body">Voor de NASA-applicatie is gekozen voor een ruimte-thema met een donkere, moderne uitstraling. Dit sluit aan bij het onderwerp (NASA en space data).</text:p>
      <text:h text:style-name="Heading_20_2" text:outline-level="2">Kleurgebruik</text:h>
      <text:p text:style-name="Text_20_body">De basis bestaat uit donkere kleuren zoals <text:span text:style-name="Source_20_Text">--space</text:span> en <text:span text:style-name="Source_20_Text">--space-2</text:span>, gecombineerd met lichte tekst (<text:span text:style-name="Source_20_Text">--ink</text:span>). Accentkleuren zoals blauw, rood en goud worden gebruikt om ruimte-elementen en belangrijke acties te benadrukken.</text:p>
      <text:h text:style-name="Heading_20_2" text:outline-level="2">Typografie</text:h>
      <text:p text:style-name="Text_20_body">Er wordt gebruik gemaakt van drie fonts:</text:p>
      <text:list text:style-name="L1">
        <text:list-item>
          <text:p text:style-name="P1"><text:span text:style-name="Strong_20_Emphasis">DM Serif Display</text:span> voor titels (klassiek en “space editorial” gevoel)</text:p>
        </text:list-item>
        <text:list-item>
          <text:p text:style-name="P1"><text:span text:style-name="Strong_20_Emphasis">Space Grotesk</text:span> voor algemene tekst (modern en leesbaar)</text:p>
        </text:list-item>
        <text:list-item>
          <text:p text:style-name="P1"><text:span text:style-name="Strong_20_Emphasis">IBM Plex Mono</text:span> voor technische UI-elementen (API/labels)</text:p>
        </text:list-item>
      </text:list>
      <text:h text:style-name="Heading_20_2" text:outline-level="2">Layout en structuur</text:h>
      <text:p text:style-name="Text_20_body">De layout is opgebouwd met grid-systemen (<text:span text:style-name="Source_20_Text">display: grid</text:span>) voor overzichtelijke en responsive pagina’s. Belangrijke secties zoals hero, gallery en cards zijn consistent opgebouwd met duidelijke spacing.</text:p>
      <text:h text:style-name="Heading_20_2" text:outline-level="2">Visuele effecten</text:h>
      <text:p text:style-name="Text_20_body">Er zijn veel subtiele animaties gebruikt:</text:p>
      <text:list text:style-name="L2">
        <text:list-item>
          <text:p text:style-name="P2">Sterren-animatie (<text:span text:style-name="Source_20_Text">starTwinkle</text:span>, <text:span text:style-name="Source_20_Text">starDrift</text:span>) voor een space gevoel</text:p>
        </text:list-item>
        <text:list-item>
          <text:p text:style-name="P2">Floating elements en glow-effecten voor diepte</text:p>
        </text:list-item>
        <text:list-item>
          <text:p text:style-name="P2">Shimmer skeleton loaders voor loading states</text:p>
        </text:list-item>
      </text:list>
      <text:h text:style-name="Heading_20_2" text:outline-level="2">Component styling</text:h>
      <text:list text:style-name="L3">
        <text:list-item>
          <text:p text:style-name="P3">Cards hebben afgeronde hoeken en zachte shadows (<text:span text:style-name="Source_20_Text">--shadow</text:span>)</text:p>
        </text:list-item>
        <text:list-item>
          <text:p text:style-name="P3">Navigatie is sticky met blur-effect voor modern UI gevoel</text:p>
        </text:list-item>
        <text:list-item>
          <text:p text:style-name="P3">Buttons en links hebben hover-transities voor interactie-feedback</text:p>
        </text:list-item>
      </text:list>
      <text:h text:style-name="Heading_20_2" text:outline-level="2">Responsive design</text:h>
      <text:p text:style-name="Text_20_body">De layout schaalt naar kleinere schermen met media queries op 1200px, 900px en 640px. Grid layouts worden dan single-column om leesbaarheid op mobiel te verbeteren.</text:p>
      <text:h text:style-name="Heading_20_2" text:outline-level="2"><text:soft-page-break/>Conclusie</text:h>
      <text:p text:style-name="Text_20_body">De stijlkeuzes zorgen voor een consistente, moderne en space-geïnspireerde interface die aansluit bij NASA-data, terwijl de UI overzichtelijk en gebruiksvriendelijk blijf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7T11:26:06.201359752</meta:creation-date>
    <dc:date>2026-06-17T11:26:22.447361194</dc:date>
    <meta:editing-duration>PT16S</meta:editing-duration>
    <meta:editing-cycles>1</meta:editing-cycles>
    <meta:document-statistic meta:table-count="0" meta:image-count="0" meta:object-count="0" meta:page-count="2" meta:paragraph-count="24" meta:word-count="236" meta:character-count="1637" meta:non-whitespace-character-count="1438"/>
    <meta:generator>LibreOffice/24.2.7.2$Linux_X86_64 LibreOffice_project/420$Build-2</meta:generator>
  </office:meta>
</office:document-meta>
</file>