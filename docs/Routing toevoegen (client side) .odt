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uting</text:h>
      <text:h text:style-name="Heading_20_3" text:outline-level="3">Waarom gebruiken we React Router?</text:h>
      <text:p text:style-name="Text_20_body">React Router maakt het mogelijk om meerdere pagina's te hebben met unieke URL's. Dit zorgt voor een betere gebruikerservaring en maakt navigatie eenvoudiger dan het tonen/verbergen van componenten met state.</text:p>
      <text:h text:style-name="Heading_20_3" text:outline-level="3">Alternatieven voor React Router</text:h>
      <text:list text:style-name="L2">
        <text:list-item>
          <text:p text:style-name="P1">TanStack Router</text:p>
        </text:list-item>
        <text:list-item>
          <text:p text:style-name="P1">Reach Router</text:p>
        </text:list-item>
        <text:list-item>
          <text:p text:style-name="P1">Wouter</text:p>
        </text:list-item>
        <text:list-item>
          <text:p text:style-name="P1">Next.js App Router (voor Next.js-projecten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1:22:48.919200781</meta:creation-date>
    <dc:date>2026-06-17T11:23:44.577735374</dc:date>
    <meta:editing-duration>PT56S</meta:editing-duration>
    <meta:editing-cycles>1</meta:editing-cycles>
    <meta:document-statistic meta:table-count="0" meta:image-count="0" meta:object-count="0" meta:page-count="1" meta:paragraph-count="8" meta:word-count="54" meta:character-count="358" meta:non-whitespace-character-count="316"/>
    <meta:generator>LibreOffice/24.2.7.2$Linux_X86_64 LibreOffice_project/420$Build-2</meta:generator>
  </office:meta>
</office:document-meta>
</file>