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ate in React</text:h>
      <text:p text:style-name="Text_20_body">State is data binnen een component die kan veranderen tijdens de levensduur van de applicatie. Wanneer state verandert, rendert React het component opnieuw zodat de UI wordt bijgewerkt met de nieuwe gegeve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1:24:24.046744175</meta:creation-date>
    <dc:date>2026-06-17T11:24:39.629620210</dc:date>
    <meta:editing-duration>PT16S</meta:editing-duration>
    <meta:editing-cycles>1</meta:editing-cycles>
    <meta:document-statistic meta:table-count="0" meta:image-count="0" meta:object-count="0" meta:page-count="1" meta:paragraph-count="2" meta:word-count="35" meta:character-count="222" meta:non-whitespace-character-count="189"/>
    <meta:generator>LibreOffice/24.2.7.2$Linux_X86_64 LibreOffice_project/420$Build-2</meta:generator>
  </office:meta>
</office:document-meta>
</file>