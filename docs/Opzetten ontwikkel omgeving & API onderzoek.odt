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0db7" officeooo:paragraph-rsid="00000db7"/>
    </style:style>
    <style:style style:name="P2" style:family="paragraph" style:parent-style-name="Text_20_body">
      <style:text-properties officeooo:rsid="00000db7" officeooo:paragraph-rsid="00000d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oor deze opdracht heb ik drie verschillende API's onderzocht: de Steam API, Spotify API en NASA API. Vervolgens heb ik deze API's vergeleken op basis van beschikbaarheid van data, authenticatie, rate limits en kwaliteit van de documentatie.</text:p>
      <text:h text:style-name="Heading_20_2" text:outline-level="2">1. Steam API</text:h>
      <text:h text:style-name="Heading_20_3" text:outline-level="3">Beschikbaarheid van data</text:h>
      <text:p text:style-name="Text_20_body">De Steam API biedt veel informatie over games, gebruikersprofielen, achievements en statistieken. Dit is vooral interessant voor applicaties die met gaming te maken hebben.</text:p>
      <text:h text:style-name="Heading_20_3" text:outline-level="3">Authenticatie</text:h>
      <text:p text:style-name="Text_20_body">Steam maakt gebruik van een API-sleutel. Dit is relatief eenvoudig te implementeren omdat er geen ingewikkelde OAuth-authenticatie nodig is.</text:p>
      <text:h text:style-name="Heading_20_3" text:outline-level="3">Rate limits</text:h>
      <text:p text:style-name="Text_20_body">De rate limits zijn redelijk ruim voor kleine projecten en onderwijsopdrachten. Hierdoor kunnen voldoende verzoeken worden uitgevoerd zonder snel tegen beperkingen aan te lopen.</text:p>
      <text:h text:style-name="Heading_20_3" text:outline-level="3">Documentatie</text:h>
      <text:p text:style-name="Text_20_body">De documentatie is bruikbaar, maar niet altijd even overzichtelijk. Soms is extra onderzoek nodig om alle endpoints goed te begrijpen.</text:p>
      <text:h text:style-name="Heading_20_2" text:outline-level="2">2. Spotify API</text:h>
      <text:h text:style-name="Heading_20_3" text:outline-level="3">Beschikbaarheid van data</text:h>
      <text:p text:style-name="Text_20_body">De Spotify API biedt uitgebreide informatie over artiesten, albums, nummers, afspeellijsten en gebruikersgegevens. Hierdoor is het mogelijk om interessante muziekgerelateerde applicaties te ontwikkelen.</text:p>
      <text:h text:style-name="Heading_20_3" text:outline-level="3">Authenticatie</text:h>
      <text:p text:style-name="Text_20_body">Spotify gebruikt OAuth 2.0. Dit biedt goede beveiliging, maar maakt de implementatie complexer dan een eenvoudige API-sleutel.</text:p>
      <text:h text:style-name="Heading_20_3" text:outline-level="3">Rate limits</text:h>
      <text:p text:style-name="Text_20_body">Spotify hanteert rate limits om misbruik te voorkomen. Voor kleine projecten zijn deze meestal geen probleem.</text:p>
      <text:h text:style-name="Heading_20_3" text:outline-level="3">Documentatie</text:h>
      <text:p text:style-name="Text_20_body">De documentatie van Spotify is zeer uitgebreid en duidelijk. Er worden veel voorbeelden gegeven, waardoor het eenvoudiger is om de API te leren gebruiken.</text:p>
      <text:h text:style-name="Heading_20_2" text:outline-level="2"><text:soft-page-break/>3. NASA API</text:h>
      <text:h text:style-name="Heading_20_3" text:outline-level="3">Beschikbaarheid van data</text:h>
      <text:p text:style-name="Text_20_body">De NASA API biedt toegang tot verschillende datasets, zoals ruimtefoto's, astronomische informatie en gegevens van ruimteonderzoek. De bekendste endpoint is de "Astronomy Picture of the Day" (APOD).</text:p>
      <text:h text:style-name="Heading_20_3" text:outline-level="3">Authenticatie</text:h>
      <text:p text:style-name="Text_20_body">NASA gebruikt een eenvoudige API-sleutel. Dit maakt de API toegankelijk voor beginners en eenvoudig te implementeren.</text:p>
      <text:h text:style-name="Heading_20_3" text:outline-level="3">Rate limits</text:h>
      <text:p text:style-name="Text_20_body">De gratis API-sleutel biedt voldoende verzoeken per uur voor educatieve projecten en kleine applicaties.</text:p>
      <text:h text:style-name="Heading_20_3" text:outline-level="3">Documentatie</text:h>
      <text:p text:style-name="Text_20_body">De documentatie is overzichtelijk en duidelijk geschreven. Daarnaast zijn er veel voorbeelden beschikbaar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7T11:06:23.534191291</meta:creation-date>
    <dc:date>2026-06-17T11:18:23.366542468</dc:date>
    <meta:editing-duration>PT1M45S</meta:editing-duration>
    <meta:editing-cycles>1</meta:editing-cycles>
    <meta:document-statistic meta:table-count="0" meta:image-count="0" meta:object-count="0" meta:page-count="2" meta:paragraph-count="28" meta:word-count="304" meta:character-count="2197" meta:non-whitespace-character-count="1921"/>
    <meta:generator>LibreOffice/24.2.7.2$Linux_X86_64 LibreOffice_project/420$Build-2</meta:generator>
  </office:meta>
</office:document-meta>
</file>