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00db7" officeooo:paragraph-rsid="00000db7"/>
    </style:style>
    <style:style style:name="P2" style:family="paragraph" style:parent-style-name="Standard">
      <style:text-properties officeooo:rsid="00000db7" officeooo:paragraph-rsid="00000db7"/>
    </style:style>
    <style:style style:name="P3" style:family="paragraph" style:parent-style-name="Text_20_body">
      <style:text-properties officeooo:rsid="00000db7" officeooo:paragraph-rsid="00000db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aarom State Management? (Context API vs. Redux)</text:h>
      <text:p text:style-name="Text_20_body">Voor deze applicatie heb ik React Context API en Redux vergeleken.</text:p>
      <text:h text:style-name="Heading_20_2" text:outline-level="2">Context API</text:h>
      <text:list text:style-name="L1">
        <text:list-item>
          <text:p text:style-name="P4">Eenvoudig te implementeren, geen extra libraries nodig.</text:p>
        </text:list-item>
        <text:list-item>
          <text:p text:style-name="P4">Geschikt voor kleine tot middelgrote applicaties.</text:p>
        </text:list-item>
        <text:list-item>
          <text:p text:style-name="P4">Werkt goed met de bestaande localStorage-cache, waardoor onnodige NASA API-calls worden voorkomen.</text:p>
        </text:list-item>
      </text:list>
      <text:h text:style-name="Heading_20_2" text:outline-level="2">Redux</text:h>
      <text:list text:style-name="L2">
        <text:list-item>
          <text:p text:style-name="P5">Krachtiger voor grote applicaties met veel gedeelde state.</text:p>
        </text:list-item>
        <text:list-item>
          <text:p text:style-name="P5">Complexer om op te zetten en te onderhouden.</text:p>
        </text:list-item>
        <text:list-item>
          <text:p text:style-name="P5">Voor dit project biedt Redux weinig extra voordelen.</text:p>
        </text:list-item>
      </text:list>
      <text:h text:style-name="Heading_20_2" text:outline-level="2">Gekozen oplossing: Context API</text:h>
      <text:p text:style-name="Text_20_body">Ik kies voor React Context API omdat de applicatie relatief klein is en slechts enkele NASA API-endpoints gebruikt. Daarnaast wordt data al 6 uur gecachet in localStorage, waardoor API-verzoeken beperkt blijven. Hierdoor is Redux niet noodzakelijk en blijft de applicatie eenvoudiger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11:06:23.534191291</meta:creation-date>
    <dc:date>2026-06-17T11:21:35.190163471</dc:date>
    <meta:editing-duration>PT4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21" meta:character-count="806" meta:non-whitespace-character-count="703"/>
  </office:meta>
</office:document-meta>
</file>